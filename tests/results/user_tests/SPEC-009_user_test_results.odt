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80000046101E3C1AE.png" manifest:media-type="image/png"/>
  <manifest:file-entry manifest:full-path="Pictures/100000010000001800000001EFE1ED7B.png" manifest:media-type="image/png"/>
  <manifest:file-entry manifest:full-path="Pictures/10000001000007A30000032339D445D1.png" manifest:media-type="image/png"/>
  <manifest:file-entry manifest:full-path="Pictures/1000000100000795000005E53A27BE16.png" manifest:media-type="image/png"/>
  <manifest:file-entry manifest:full-path="Pictures/10000001000007C70000035B7B2085BC.png" manifest:media-type="image/png"/>
  <manifest:file-entry manifest:full-path="Pictures/100000010000044A00000246EF46C0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965in" svg:y="0.0965in" svg:width="3.2661in" svg:height="1.7311in" draw:z-index="0"><draw:image xlink:href="Pictures/100000010000044A00000246EF46C0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1398in" svg:y="0.0654in" svg:width="5.7445in" svg:height="2.4783in" draw:z-index="1"><draw:image xlink:href="Pictures/10000001000007C70000035B7B2085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252in" svg:y="0.0366in" svg:width="5.9236in" svg:height="2.4327in" draw:z-index="4"><draw:image xlink:href="Pictures/10000001000007A30000032339D445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width="0.25in" svg:height="0.0161in" draw:z-index="2"><draw:image xlink:href="Pictures/100000010000001800000001EFE1ED7B.png" xlink:type="simple" xlink:show="embed" xlink:actuate="onLoad" draw:mime-type="image/png"/></draw:frame></text:p>
      <text:p text:style-name="Standard"/>
      <text:p text:style-name="Standard"><draw:frame draw:style-name="fr3" draw:name="Image4" text:anchor-type="char" svg:width="0.25in" svg:height="0.0161in" draw:z-index="3"><draw:image xlink:href="Pictures/100000010000001800000001EFE1ED7B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6" text:anchor-type="char" svg:width="6.472in" svg:height="5.0311in" draw:z-index="5"><draw:image xlink:href="Pictures/1000000100000795000005E53A27BE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7" text:anchor-type="char" svg:x="0.3453in" svg:y="0.228in" svg:width="6.6929in" svg:height="7.1591in" draw:z-index="6"><draw:image xlink:href="Pictures/10000001000004180000046101E3C1A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4T19:21:26.107944250</meta:creation-date>
    <meta:generator>LibreOffice/24.2.7.2$Linux_X86_64 LibreOffice_project/420$Build-2</meta:generator>
    <dc:date>2026-06-05T20:24:36.358327242</dc:date>
    <meta:editing-duration>PT13M21S</meta:editing-duration>
    <meta:editing-cycles>3</meta:editing-cycles>
    <meta:document-statistic meta:table-count="0" meta:image-count="7" meta:object-count="0" meta:page-count="3" meta:paragraph-count="0" meta:word-count="0" meta:character-count="0" meta:non-whitespace-character-count="0"/>
  </office:meta>
</office:document-meta>
</file>